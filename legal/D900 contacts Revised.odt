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1020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R</text:span></text:span><text:span text:style-name="Strong_20_Emphasis">evised Document: D900 – Exclusive Decorator Allocation within the IQ Conservator Space, Durham</text:span></text:h>
      <text:h text:style-name="Heading_20_2" text:outline-level="2"><text:span text:style-name="Strong_20_Emphasis">National Program Launch: A Democratic and Legal Initiative</text:span></text:h>
      <text:p text:style-name="Text_20_body">The NorthWest Finance Group, operating within the City of Durham, NC, has finalized updated pricing structures and retail closeout recommendations. A new callout rate has been established, and we invite direct engagement regarding <text:span text:style-name="Strong_20_Emphasis">finance numbers</text:span> and <text:span text:style-name="Strong_20_Emphasis">trade reaction protocols</text:span>.</text:p>
      <text:p text:style-name="Text_20_body">For detailed figures, operational guidance, and administrative routing:</text:p>
      <text:list text:style-name="L1">
        <text:list-item>
          <text:p text:style-name="P2"><text:span text:style-name="Strong_20_Emphasis">{office connect}</text:span> </text:p>
        </text:list-item>
        <text:list-item>
          <text:p text:style-name="P1"><text:span text:style-name="Strong_20_Emphasis">{mayorial contacts}</text:span> </text:p>
        </text:list-item>
      </text:list>
      <text:p text:style-name="Horizontal_20_Line"/>
      <text:h text:style-name="Heading_20_2" text:outline-level="2"><text:span text:style-name="Strong_20_Emphasis">Regulated Trade Terms (Incorporated by Reference)</text:span></text:h>
      <text:list text:style-name="L2">
        <text:list-item>
          <text:p text:style-name="P4"><text:span text:style-name="Strong_20_Emphasis">Fighting as Conduct</text:span> — classified strictly as a behavioral category relevant to workplace, civic, and contractual environments; not an endorsement of conflict but a designation for compliance review. </text:p>
        </text:list-item>
        <text:list-item>
          <text:p text:style-name="P4"><text:span text:style-name="Strong_20_Emphasis">Aspect of Dogmatic Process</text:span> — limited to procedural interpretation frameworks and capped at “not more than usually two pages” in any formal submission or review cycle. </text:p>
        </text:list-item>
        <text:list-item>
          <text:p text:style-name="P3"><text:span text:style-name="Strong_20_Emphasis">Treatment of Man as Human Specimen</text:span> — revised to reflect chiropractic, biomechanical, and ergonomic standards; the “vessel of man” is treated as a normative human structure, <text:span text:style-name="Strong_20_Emphasis">not</text:span> a physiological defect or medical anomaly. </text:p>
        </text:list-item>
      </text:list>
      <text:p text:style-name="Horizontal_20_Line"/>
      <text:h text:style-name="Heading_20_2" text:outline-level="2"><text:span text:style-name="Strong_20_Emphasis">Potential Areas of Review</text:span></text:h>
      <text:list text:style-name="L3">
        <text:list-item>
          <text:p text:style-name="P6"><text:span text:style-name="Strong_20_Emphasis">Labor Relations</text:span> — workforce coordination and compliance </text:p>
        </text:list-item>
        <text:list-item>
          <text:p text:style-name="P6"><text:span text:style-name="Strong_20_Emphasis">Democratic Standards</text:span> — governance expectations </text:p>
        </text:list-item>
        <text:list-item>
          <text:p text:style-name="P6"><text:span text:style-name="Strong_20_Emphasis">Ethical Adjustments</text:span> — policy alignment </text:p>
        </text:list-item>
        <text:list-item>
          <text:p text:style-name="P6"><text:span text:style-name="Strong_20_Emphasis">National Warranty</text:span> — federal program assurances </text:p>
        </text:list-item>
        <text:list-item>
          <text:p text:style-name="P6"><text:span text:style-name="Strong_20_Emphasis">Shipwright Standards</text:span> — technical and structural benchmarks </text:p>
        </text:list-item>
        <text:list-item>
          <text:p text:style-name="P6"><text:span text:style-name="Strong_20_Emphasis">Senatorial Connections</text:span> — legislative engagement </text:p>
        </text:list-item>
        <text:list-item>
          <text:p text:style-name="P6"><text:span text:style-name="Strong_20_Emphasis">Professional Legal Services</text:span> — advisory and representation </text:p>
        </text:list-item>
        <text:list-item>
          <text:p text:style-name="P6"><text:span text:style-name="Strong_20_Emphasis">Professional Tidying Standards</text:span> — operational refinement </text:p>
        </text:list-item>
        <text:list-item>
          <text:p text:style-name="P6"><text:span text:style-name="Strong_20_Emphasis">Ethical Boundaries</text:span> — compliance and oversight </text:p>
        </text:list-item>
        <text:list-item>
          <text:p text:style-name="P6"><text:span text:style-name="Strong_20_Emphasis">Korean National Trading Desk</text:span> — international coordination </text:p>
        </text:list-item>
        <text:list-item>
          <text:p text:style-name="P6"><text:span text:style-name="Strong_20_Emphasis">Foreign Embassy Enterprise</text:span> — diplomatic interfaces </text:p>
        </text:list-item>
        <text:list-item>
          <text:p text:style-name="P5"><text:soft-page-break/><text:span text:style-name="Strong_20_Emphasis">Technical Boundary Exploration</text:span> — innovation and limits </text:p>
        </text:list-item>
      </text:list>
      <text:p text:style-name="Horizontal_20_Line"/>
      <text:h text:style-name="Heading_20_2" text:outline-level="2"><text:span text:style-name="Strong_20_Emphasis">Financial Scope</text:span></text:h>
      <text:p text:style-name="Text_20_body"><text:span text:style-name="Strong_20_Emphasis">$800,000,000,000.00</text:span> allocated to IQ Conservator operations in Durham, NC and associated city centers.</text:p>
      <text:p text:style-name="Horizontal_20_Line"/>
      <text:h text:style-name="Heading_20_2" text:outline-level="2"><text:span text:style-name="Strong_20_Emphasis">Signature</text:span></text:h>
      <text:p text:style-name="Text_20_body"><text:span text:style-name="Emphasis">(Signed in black ink)</text:span> <text:line-break/><text:span text:style-name="Strong_20_Emphasis">Max Rupplin (MEARVK LLC)</text:span></text:p>
      <text:list text:style-name="L4">
        <text:list-item>
          <text:p text:style-name="P8">President, A105 National Trading Desk </text:p>
        </text:list-item>
        <text:list-item>
          <text:p text:style-name="P8">Durham Democrat &amp; Resident </text:p>
        </text:list-item>
        <text:list-item>
          <text:p text:style-name="P8">National ID: Financed </text:p>
        </text:list-item>
        <text:list-item>
          <text:p text:style-name="P8">Technical Liaison, City Finance </text:p>
        </text:list-item>
        <text:list-item>
          <text:p text:style-name="P7">172–251 IQ Conservator </text:p>
        </text:list-item>
      </text:list>
      <text:p text:style-name="Horizontal_20_Line"/>
      <text:h text:style-name="Heading_20_2" text:outline-level="2"><text:span text:style-name="Strong_20_Emphasis">Language Availability</text:span></text:h>
      <text:list text:style-name="L5">
        <text:list-item>
          <text:p text:style-name="P10"><text:span text:style-name="Strong_20_Emphasis">Korean</text:span> </text:p>
        </text:list-item>
        <text:list-item>
          <text:p text:style-name="P10"><text:span text:style-name="Strong_20_Emphasis">Japanese</text:span> </text:p>
        </text:list-item>
        <text:list-item>
          <text:p text:style-name="P10"><text:span text:style-name="Strong_20_Emphasis">German</text:span> </text:p>
        </text:list-item>
        <text:list-item>
          <text:p text:style-name="P10"><text:span text:style-name="Strong_20_Emphasis">French</text:span> </text:p>
        </text:list-item>
        <text:list-item>
          <text:p text:style-name="P10"><text:span text:style-name="Strong_20_Emphasis">Spanish</text:span> </text:p>
        </text:list-item>
        <text:list-item>
          <text:p text:style-name="P10"><text:span text:style-name="Strong_20_Emphasis">Vietnamese</text:span> </text:p>
        </text:list-item>
        <text:list-item>
          <text:p text:style-name="P10"><text:span text:style-name="Strong_20_Emphasis">Thai</text:span> </text:p>
        </text:list-item>
        <text:list-item>
          <text:p text:style-name="P10"><text:span text:style-name="Strong_20_Emphasis">Ukrainian</text:span> </text:p>
        </text:list-item>
        <text:list-item>
          <text:p text:style-name="P10"><text:span text:style-name="Strong_20_Emphasis">Russian</text:span> </text:p>
        </text:list-item>
        <text:list-item>
          <text:p text:style-name="P10"><text:span text:style-name="Strong_20_Emphasis">Chinese</text:span> </text:p>
        </text:list-item>
        <text:list-item>
          <text:p text:style-name="P10"><text:span text:style-name="Strong_20_Emphasis">Hebrew</text:span> </text:p>
        </text:list-item>
        <text:list-item>
          <text:p text:style-name="P9"><text:span text:style-name="Strong_20_Emphasis">English</text:span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3:32:44.434824074</meta:creation-date>
    <dc:date>2026-06-01T13:33:20.642247689</dc:date>
    <meta:editing-duration>PT36S</meta:editing-duration>
    <meta:editing-cycles>1</meta:editing-cycles>
    <meta:document-statistic meta:table-count="0" meta:image-count="0" meta:object-count="0" meta:page-count="2" meta:paragraph-count="45" meta:word-count="319" meta:character-count="2281" meta:non-whitespace-character-count="1991"/>
    <meta:generator>LibreOffice/24.2.7.2$Linux_X86_64 LibreOffice_project/420$Build-2</meta:generator>
  </office:meta>
</office:document-meta>
</file>