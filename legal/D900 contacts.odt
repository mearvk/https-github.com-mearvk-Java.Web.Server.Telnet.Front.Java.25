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000000180ACE591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Aptos" fo:font-size="12pt" fo:font-weight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Aptos" fo:font-size="12pt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Aptos" fo:font-size="12pt" fo:font-weight="bold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Aptos" fo:font-size="12pt" fo:font-weight="bold"/>
    </style:style>
    <style:style style:name="P6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Aptos" fo:font-size="12pt" fo:font-weight="bold"/>
    </style:style>
    <style:style style:name="P7" style:family="paragraph" style:parent-style-name="Text_20_body" style:list-style-name="L3">
      <style:paragraph-properties fo:margin-left="0in" fo:margin-right="0in" fo:text-indent="0in" style:auto-text-indent="false"/>
      <style:text-properties fo:color="#000000" loext:opacity="100%" style:font-name="Aptos" fo:font-size="12pt" fo:font-weight="bold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Aptos" fo:font-size="12pt"/>
    </style:style>
    <style:style style:name="P9" style:family="paragraph" style:parent-style-name="Text_20_body" style:list-style-name="L1">
      <style:paragraph-properties fo:margin-left="0in" fo:margin-right="0in" fo:text-indent="0in" style:auto-text-indent="false"/>
      <style:text-properties fo:color="#000000" loext:opacity="100%" style:font-name="Aptos" fo:font-size="12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Aptos" fo:font-size="12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Aptos" fo:font-size="12pt" fo:font-style="italic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color="#000000" loext:opacity="100%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color="#000000" loext:opacity="100%"/>
    </style:style>
    <style:style style:name="T1" style:family="text">
      <style:text-properties fo:font-weight="bold"/>
    </style:style>
    <style:style style:name="T2" style:family="text">
      <style:text-properties fo:color="#000000" loext:opacity="100%" style:font-name="Aptos" fo:font-size="12pt"/>
    </style:style>
    <style:style style:name="T3" style:family="text">
      <style:text-properties style:font-name="Aptos" fo:font-size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vised Document: D900 – Exclusive Decorator Allocation within the IQ Conservator Space, Durham</text:p>
      <text:p text:style-name="P2">National Program Launch: A Democratic and Legal Initiative</text:p>
      <text:p text:style-name="P3">The NorthWest Finance Group, operating within the City of Durham, NC, has finalized updated pricing structures and retail closeout recommendations. A new callout rate has been established, and we invite you to engage with us directly regarding <text:span text:style-name="T1">finance numbers</text:span> and <text:span text:style-name="T1">trade reaction protocols</text:span>.</text:p>
      <text:p text:style-name="P3">Please contact our office for detailed figures and operational guidance.</text:p>
      <text:p text:style-name="P1"><text:span text:style-name="T2"><text:line-break/>link: {</text:span><text:a xlink:type="simple" xlink:href="https://github.com/mearvk/Java.Web.Server.Telnet.Front.Java.21/blob/main/north.carolina/legal/legal/mearvk.003.jpeg" text:style-name="Internet_20_link" text:visited-style-name="Visited_20_Internet_20_Link">office connect</text:a><text:span text:style-name="T2">}</text:span></text:p>
      <text:p text:style-name="P1"><text:span text:style-name="T2">link: {</text:span><text:a xlink:type="simple" xlink:href="https://github.com/mearvk/Java.Web.Server.Telnet.Front.Java.21/tree/main/contacts/mayorial/state" text:style-name="Internet_20_link" text:visited-style-name="Visited_20_Internet_20_Link">mayorial contacts</text:a><text:span text:style-name="T2">}</text:span></text:p>
      <text:p text:style-name="Horizontal_20_Line"/>
      <text:p text:style-name="P5">Potential Areas of Review</text:p>
      <text:list text:style-name="L1">
        <text:list-item>
          <text:p text:style-name="P8"><text:span text:style-name="T1">Labor Relations</text:span> — workforce coordination and compliance</text:p>
        </text:list-item>
        <text:list-item>
          <text:p text:style-name="P8"><text:span text:style-name="T1">Democratic Standards</text:span> — governance expectations</text:p>
        </text:list-item>
        <text:list-item>
          <text:p text:style-name="P8"><text:span text:style-name="T1">Ethical Adjustments</text:span> — policy alignment</text:p>
        </text:list-item>
        <text:list-item>
          <text:p text:style-name="P8"><text:span text:style-name="T1">National Warranty</text:span> — federal program assurances</text:p>
        </text:list-item>
        <text:list-item>
          <text:p text:style-name="P8"><text:span text:style-name="T1">Shipwright Standards</text:span> — technical and structural benchmarks</text:p>
        </text:list-item>
        <text:list-item>
          <text:p text:style-name="P8"><text:span text:style-name="T1">Senatorial Connections</text:span> — legislative engagement</text:p>
        </text:list-item>
        <text:list-item>
          <text:p text:style-name="P8"><text:span text:style-name="T1">Professional Legal Services</text:span> — advisory and representation</text:p>
        </text:list-item>
        <text:list-item>
          <text:p text:style-name="P8"><text:span text:style-name="T1">Professional Tidying Standards</text:span> — operational refinement</text:p>
        </text:list-item>
        <text:list-item>
          <text:p text:style-name="P8"><text:span text:style-name="T1">Ethical Boundaries</text:span> — compliance and oversight</text:p>
        </text:list-item>
        <text:list-item>
          <text:p text:style-name="P8"><text:span text:style-name="T1">Korean National Trading Desk</text:span> — international coordination</text:p>
        </text:list-item>
        <text:list-item>
          <text:p text:style-name="P8"><text:span text:style-name="T1">Foreign Embassy Enterprise</text:span> — diplomatic interfaces</text:p>
        </text:list-item>
        <text:list-item>
          <text:p text:style-name="P9"><text:span text:style-name="T1">Technical Boundary Exploration</text:span> — innovation and limits</text:p>
        </text:list-item>
      </text:list>
      <text:p text:style-name="Horizontal_20_Line"/>
      <text:p text:style-name="P4">Financial Scope</text:p>
      <text:p text:style-name="P10"><text:span text:style-name="T1">$800,000,000,000.00</text:span> allocated to IQ Conservator operations in Durham, NC and associated city centers.</text:p>
      <text:p text:style-name="Horizontal_20_Line"/>
      <text:p text:style-name="P4">Signature</text:p>
      <text:p text:style-name="P11">(Signed in black ink)</text:p>
      <text:p text:style-name="P4">Max Rupplin (MEARVK LLC)</text:p>
      <text:p text:style-name="P12"><text:soft-page-break/><draw:frame draw:style-name="fr1" draw:name="Image1" text:anchor-type="as-char" svg:width="1.948in" svg:height="1.302in" draw:z-index="0"><draw:image xlink:href="Pictures/100000010000024000000180ACE59162.png" xlink:type="simple" xlink:show="embed" xlink:actuate="onLoad" draw:mime-type="image/png"/><svg:title>Executive signature design</svg:title></draw:frame><text:bookmark text:name="image_0"/></text:p>
      <text:list text:style-name="L2">
        <text:list-item>
          <text:p text:style-name="P13">  <text:span text:style-name="T3">President, A105 National Trading Desk</text:span></text:p>
        </text:list-item>
        <text:list-item>
          <text:p text:style-name="P13">  <text:span text:style-name="T3">Durham Democrat &amp; Resident</text:span></text:p>
        </text:list-item>
        <text:list-item>
          <text:p text:style-name="P13">  <text:span text:style-name="T3">National ID: Financed</text:span></text:p>
        </text:list-item>
        <text:list-item>
          <text:p text:style-name="P13">  <text:span text:style-name="T3">Technical Liaison, City Finance</text:span></text:p>
        </text:list-item>
        <text:list-item>
          <text:p text:style-name="P13">  <text:span text:style-name="T3">172-251 IQ Conservator</text:span></text:p>
        </text:list-item>
      </text:list>
      <text:p text:style-name="Horizontal_20_Line"/>
      <text:p text:style-name="P5">Language Availability</text:p>
      <text:list text:style-name="L3">
        <text:list-item>
          <text:p text:style-name="P6">Korean</text:p>
        </text:list-item>
        <text:list-item>
          <text:p text:style-name="P6">Japanese</text:p>
        </text:list-item>
        <text:list-item>
          <text:p text:style-name="P6">German</text:p>
        </text:list-item>
        <text:list-item>
          <text:p text:style-name="P6">French</text:p>
        </text:list-item>
        <text:list-item>
          <text:p text:style-name="P6">Spanish</text:p>
        </text:list-item>
        <text:list-item>
          <text:p text:style-name="P6">Vietnamese</text:p>
        </text:list-item>
        <text:list-item>
          <text:p text:style-name="P6">Thai</text:p>
        </text:list-item>
        <text:list-item>
          <text:p text:style-name="P6">Ukrainian</text:p>
        </text:list-item>
        <text:list-item>
          <text:p text:style-name="P6">Russian</text:p>
        </text:list-item>
        <text:list-item>
          <text:p text:style-name="P6">Chinese</text:p>
        </text:list-item>
        <text:list-item>
          <text:p text:style-name="P6">Hebrew</text:p>
        </text:list-item>
        <text:list-item>
          <text:p text:style-name="P7">English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12:19:45.727870051</meta:creation-date>
    <dc:date>2026-06-01T12:20:11.720102859</dc:date>
    <meta:editing-duration>PT26S</meta:editing-duration>
    <meta:editing-cycles>1</meta:editing-cycles>
    <meta:document-statistic meta:table-count="0" meta:image-count="1" meta:object-count="0" meta:page-count="2" meta:paragraph-count="43" meta:word-count="231" meta:character-count="1645" meta:non-whitespace-character-count="1461"/>
    <meta:generator>LibreOffice/24.2.7.2$Linux_X86_64 LibreOffice_project/420$Build-2</meta:generator>
  </office:meta>
</office:document-meta>
</file>